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063" officeooo:paragraph-rsid="00110063"/>
    </style:style>
    <style:style style:name="P2" style:family="paragraph" style:parent-style-name="Standard">
      <style:text-properties officeooo:rsid="00110063" officeooo:paragraph-rsid="00118046"/>
    </style:style>
    <style:style style:name="P3" style:family="paragraph" style:parent-style-name="Standard">
      <style:text-properties officeooo:paragraph-rsid="00110063"/>
    </style:style>
    <style:style style:name="P4" style:family="paragraph" style:parent-style-name="Standard">
      <style:text-properties officeooo:paragraph-rsid="00118046"/>
    </style:style>
    <style:style style:name="T1" style:family="text">
      <style:text-properties officeooo:rsid="000f7048"/>
    </style:style>
    <style:style style:name="T2" style:family="text">
      <style:text-properties officeooo:rsid="00110063"/>
    </style:style>
    <style:style style:name="T3" style:family="text">
      <style:text-properties officeooo:rsid="00118046"/>
    </style:style>
    <style:style style:name="T4" style:family="text">
      <style:text-properties officeooo:rsid="00136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irint 1:</text:p>
      <text:p text:style-name="P3"><text:span text:style-name="T2">ros2 launch my_usv spawn_robot.launch.py world:=/home/bolo/usv_ws/install/my_usv/share/my_usv/worlds/labirinto_9a.world x:=-3 y:=-5 </text:span>yaw:=<text:span text:style-name="T3">1.57</text:span></text:p>
      <text:p text:style-name="P1"/>
      <text:p text:style-name="P1">Labirint 2:</text:p>
      <text:p text:style-name="Standard">ros2 launch my_usv spawn_robot.launch.py world:=/home/bolo/usv_ws/install/my_usv/share/my_usv/worlds/labirinto_9b.world x:=-<text:span text:style-name="T1">6</text:span> y:=<text:span text:style-name="T1">0 </text:span>yaw:=<text:span text:style-name="T3">0</text:span></text:p>
      <text:p text:style-name="Standard"/>
      <text:p text:style-name="P2">Labirint <text:span text:style-name="T3">3</text:span>:</text:p>
      <text:p text:style-name="P4">ros2 launch my_usv spawn_robot.launch.py world:=/home/bolo/usv_ws/install/my_usv/share/my_usv/worlds/labirinto_<text:span text:style-name="T3">10</text:span>.world x:=-<text:span text:style-name="T4">2</text:span> y:=-<text:span text:style-name="T4">1</text:span><text:span text:style-name="T1"> </text:span>yaw:=<text:span text:style-name="T3">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16:24:28.329046382</meta:creation-date>
    <dc:date>2026-04-18T16:39:56.072970549</dc:date>
    <meta:editing-duration>PT11M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0" meta:character-count="449" meta:non-whitespace-character-count="425"/>
  </office:meta>
</office:document-meta>
</file>